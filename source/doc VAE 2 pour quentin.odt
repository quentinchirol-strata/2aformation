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A009F69AFB4310BAA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88cm" svg:height="29.7cm" draw:z-index="0"><draw:image xlink:href="Pictures/100000000000040000000A009F69AFB4310BAA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25T14:49:01.321000000</meta:creation-date>
    <dc:date>2026-05-25T15:00:24.518000000</dc:date>
    <meta:editing-duration>PT1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
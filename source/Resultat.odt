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693000004A6B2CF39973B09DF78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b04d2" officeooo:paragraph-rsid="000b04d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<draw:frame draw:style-name="fr1" draw:name="Image1" text:anchor-type="char" svg:width="17cm" svg:height="12.019cm" draw:z-index="0"><draw:image xlink:href="Pictures/1000000000000693000004A6B2CF39973B09DF78.png" xlink:type="simple" xlink:show="embed" xlink:actuate="onLoad" draw:mime-type="image/png"/></draw:frame>La ,première ligne est à modifier </text:p>
      <text:p text:style-name="P1"/>
      <text:p text:style-name="P1">DE ASS, DE ME , DE ES, </text:p>
      <text:p text:style-name="P1"/>
      <text:p text:style-name="P1">après c’est très simple il y a eu que 3 présentés au DEASS , 2 ont eu diplôme obtenu et la troisième personne à eu validation partielle </text:p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5-25T14:53:17.726000000</meta:creation-date>
    <dc:date>2026-05-25T15:00:00.582000000</dc:date>
    <meta:editing-duration>PT6M43S</meta:editing-duration>
    <meta:editing-cycles>1</meta:editing-cycles>
    <meta:document-statistic meta:table-count="0" meta:image-count="1" meta:object-count="0" meta:page-count="1" meta:paragraph-count="3" meta:word-count="40" meta:character-count="193" meta:non-whitespace-character-count="153"/>
    <meta:generator>LibreOffice/7.3.4.2$Windows_X86_64 LibreOffice_project/728fec16bd5f605073805c3c9e7c4212a0120dc5</meta:generator>
  </office:meta>
</office:document-meta>
</file>
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 Bold" svg:font-family="'Roboto Bold'"/>
    <style:font-face style:name="Roboto Light" svg:font-family="'Roboto Light'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200%" fo:orphans="2" fo:widows="2" fo:text-indent="0cm" style:auto-text-indent="false" fo:padding="0cm" fo:border="none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line-height="200%" fo:orphans="2" fo:widows="2" fo:text-indent="0cm" style:auto-text-indent="false" fo:padding="0cm" fo:border="none"/>
      <style:text-properties fo:font-variant="normal" fo:text-transform="none" fo:color="#2f516f" loext:opacity="100%" style:font-name="Roboto Light" fo:font-size="14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.339cm" fo:margin-bottom="0cm" style:contextual-spacing="false" fo:line-height="200%" fo:orphans="2" fo:widows="2" fo:text-indent="0cm" style:auto-text-indent="false" fo:padding="0cm" fo:border="none"/>
      <style:text-properties fo:font-variant="normal" fo:text-transform="none" fo:color="#2f516f" loext:opacity="100%" style:font-name="Roboto Light" fo:font-size="14pt" fo:letter-spacing="normal" fo:font-style="normal" fo:font-weight="normal"/>
    </style:style>
    <style:style style:name="P4" style:family="paragraph" style:parent-style-name="Text_20_body" style:list-style-name="L2">
      <style:paragraph-properties fo:margin-left="0cm" fo:margin-right="0cm" fo:margin-top="0cm" fo:margin-bottom="0cm" style:contextual-spacing="false" fo:line-height="200%" fo:orphans="2" fo:widows="2" fo:text-indent="0cm" style:auto-text-indent="false" fo:padding="0cm" fo:border="none"/>
      <style:text-properties fo:font-variant="normal" fo:text-transform="none" fo:color="#2f516f" loext:opacity="100%" style:font-name="Roboto Light" fo:font-size="14pt" fo:letter-spacing="normal" fo:font-style="normal" fo:font-weight="normal"/>
    </style:style>
    <style:style style:name="T1" style:family="text">
      <style:text-properties fo:font-variant="normal" fo:text-transform="none" fo:color="#2f516f" loext:opacity="100%" style:font-name="Roboto Light" fo:font-size="14pt" fo:letter-spacing="normal" fo:font-style="normal" fo:font-weight="normal"/>
    </style:style>
    <style:style style:name="T2" style:family="text">
      <style:text-properties fo:font-variant="normal" fo:text-transform="none" fo:color="#2f516f" loext:opacity="100%" style:font-name="Roboto Light" fo:font-size="14pt" fo:letter-spacing="normal" fo:font-style="normal" fo:font-weight="normal" officeooo:rsid="00147c0d"/>
    </style:style>
    <style:style style:name="T3" style:family="text">
      <style:text-properties fo:font-variant="normal" fo:text-transform="none" fo:color="#2f516f" loext:opacity="100%" style:font-name="Roboto Bold" fo:font-size="14pt" fo:letter-spacing="normal" fo:font-style="normal" fo:font-weight="bold" loext:padding="0cm" loext:border="none"/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e</text:span><text:span text:style-name="T2">s </text:span><text:span text:style-name="T1">métier</text:span><text:span text:style-name="T2">s</text:span><text:span text:style-name="T1"> d’assistant de service social, </text:span><text:span text:style-name="T2">d’éducateurs spécialisé ou de moniteurs éducateurs </text:span><text:span text:style-name="T1">offre</text:span><text:span text:style-name="T2">nt</text:span><text:span text:style-name="T1"> de nombreux débouchés dans le secteur </text:span><text:span text:style-name="Strong_20_Emphasis"><text:span text:style-name="T3">social, médico-social et éducatif</text:span></text:span><text:span text:style-name="T1"> :</text:span></text:p>
      <text:list xml:id="list983222873" text:style-name="L1">
        <text:list-item>
          <text:p text:style-name="P2">Hôpital</text:p>
        </text:list-item>
        <text:list-item>
          <text:p text:style-name="P2">EHPAD / Maison de retraite</text:p>
        </text:list-item>
        <text:list-item>
          <text:p text:style-name="P2">Collectivités locales (départements et communes)</text:p>
        </text:list-item>
        <text:list-item>
          <text:p text:style-name="P2">Etablissements scolaires</text:p>
        </text:list-item>
        <text:list-item>
          <text:p text:style-name="P2">Etablissements pénitentiaires</text:p>
        </text:list-item>
        <text:list-item>
          <text:p text:style-name="P2">Organismes de protection sociale (caisses de sécurité sociale, d’allocations familiales, de retraite) ;</text:p>
        </text:list-item>
        <text:list-item>
          <text:p text:style-name="P2">Associations du secteur sanitaire et social</text:p>
        </text:list-item>
      </text:list>
      <text:p text:style-name="P3">Avec de l’expérience et/ou des formations complémentaires, un assistant de service social peut évoluer vers d’autres métiers du secteur :</text:p>
      <text:list xml:id="list4006699801" text:style-name="L2">
        <text:list-item>
          <text:p text:style-name="P4">Chef de service éducatif</text:p>
        </text:list-item>
        <text:list-item>
          <text:p text:style-name="P4">Responsable de structure ou directeur d’établissement social</text:p>
        </text:list-item>
        <text:list-item>
          <text:p text:style-name="P4">Coordinateur de projets sociaux</text:p>
        </text:list-item>
        <text:list-item>
          <text:p text:style-name="P4">Formateur dans des écoles de travail social</text:p>
        </text:list-item>
        <text:list-item>
          <text:p text:style-name="P4">Médiateur familial.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 Bold" svg:font-family="'Roboto Bold'"/>
    <style:font-face style:name="Roboto Light" svg:font-family="'Roboto Light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5-25T15:21:25.587000000</meta:creation-date>
    <dc:date>2026-05-25T15:24:14.450000000</dc:date>
    <meta:editing-duration>PT2M50S</meta:editing-duration>
    <meta:editing-cycles>1</meta:editing-cycles>
    <meta:document-statistic meta:table-count="0" meta:image-count="0" meta:object-count="0" meta:page-count="2" meta:paragraph-count="14" meta:word-count="114" meta:character-count="781" meta:non-whitespace-character-count="693"/>
    <meta:generator>LibreOffice/7.3.4.2$Windows_X86_64 LibreOffice_project/728fec16bd5f605073805c3c9e7c4212a0120dc5</meta:generator>
  </office:meta>
</office:document-meta>
</file>